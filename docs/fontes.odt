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nguagem de Programação I - Etapa 2 - Leonardo Farias de Oliveira</text:p>
      <text:p text:style-name="Text_20_body">$$$ src.controle.projeto</text:p>
      <text:p text:style-name="Text_20_body">from util.gerais import imprimir_objetos, imprimir_objeto, imprimir_objetos_internos, imprimir_objetos_associação_filtros</text:p>
      <text:p text:style-name="Text_20_body">from util.data import Data</text:p>
      <text:p text:style-name="Text_20_body">from entidades.seguradora import inserir_seguradora, Seguradora, get_seguradoras</text:p>
      <text:p text:style-name="Text_20_body">from entidades.peca import Peca</text:p>
      <text:p text:style-name="Text_20_body">from entidades.sinistro import inserir_sinistro, Sinistro, get_sinistros</text:p>
      <text:p text:style-name="Text_20_body">from entidades.orcamento import criar_orcamento, get_orcamentos, selecionar_orcamento</text:p>
      <text:p text:style-name="Text_20_body"/>
      <text:p text:style-name="Text_20_body">def cadastrar_seguradoras():</text:p>
      <text:p text:style-name="Text_20_body"><text:s text:c="4"/>inserir_seguradora(Seguradora(nome='Porto Seguro', cidade='Dourados', cobertura_percentual=90))</text:p>
      <text:p text:style-name="Text_20_body"><text:s text:c="4"/>inserir_seguradora(Seguradora(nome='Bradesco Seguros', cidade='Campo Grande', cobertura_percentual=80))</text:p>
      <text:p text:style-name="Text_20_body"><text:s text:c="4"/>inserir_seguradora(Seguradora(nome='SulAmérica', cidade='Ponta porã', cobertura_percentual=70))</text:p>
      <text:p text:style-name="Text_20_body"><text:s text:c="4"/>inserir_seguradora(Seguradora(nome='Mapfre', cidade='Dourados', cobertura_percentual=85))</text:p>
      <text:p text:style-name="Text_20_body"><text:s text:c="4"/>inserir_seguradora(Seguradora(nome='Allianz', cidade='Campo Grande', cobertura_percentual=75))</text:p>
      <text:p text:style-name="Text_20_body"/>
      <text:p text:style-name="Text_20_body">def cadastrar_sinistros():</text:p>
      <text:p text:style-name="Text_20_body"><text:s text:c="4"/>sinistro = Sinistro(numero='1', cliente='Leon', telefone='67 99888-1100')</text:p>
      <text:p text:style-name="Text_20_body"><text:s text:c="4"/>inserir_sinistro(sinistro)</text:p>
      <text:p text:style-name="Text_20_body"><text:s text:c="4"/>sinistro.inserir_peca(Peca(código=11, nome='bandeja', categoria='OEM', preco=245, mecânico_próprio=False))</text:p>
      <text:p text:style-name="Text_20_body"><text:s text:c="4"/>sinistro.inserir_peca(Peca(código=12, nome='pivo', categoria='OEM', preco=250, mecânico_próprio=False))</text:p>
      <text:p text:style-name="Text_20_body"/>
      <text:p text:style-name="Text_20_body"><text:s text:c="4"/>sinistro = Sinistro(numero='6', cliente='Scott', telefone='67 98988-1101')</text:p>
      <text:p text:style-name="Text_20_body"><text:s text:c="4"/>inserir_sinistro(sinistro)</text:p>
      <text:p text:style-name="Text_20_body"><text:s text:c="4"/>sinistro.inserir_peca(Peca(código=21, nome='amortecedor', categoria='Original', preco=310, mecânico_próprio=False))</text:p>
      <text:p text:style-name="Text_20_body"><text:s text:c="4"/>sinistro.inserir_peca(Peca(código=22, nome='kit batente', categoria='Original', preco=90, mecânico_próprio=False))</text:p>
      <text:p text:style-name="Text_20_body"/>
      <text:p text:style-name="Text_20_body"><text:s text:c="4"/>sinistro = Sinistro(numero='11', cliente='Kennedy', telefone='67 96898-1000')</text:p>
      <text:p text:style-name="Text_20_body"><text:s text:c="4"/>inserir_sinistro(sinistro)</text:p>
      <text:p text:style-name="Text_20_body"><text:s text:c="4"/>sinistro.inserir_peca(Peca(código=31, nome='rolamento', categoria='Original', preco=180, mecânico_próprio=True))</text:p>
      <text:p text:style-name="Text_20_body"><text:soft-page-break/><text:s text:c="4"/>sinistro.inserir_peca(Peca(código=33, nome='cubo', categoria='Original', preco=180, mecânico_próprio=True))</text:p>
      <text:p text:style-name="Text_20_body"/>
      <text:p text:style-name="Text_20_body"><text:s text:c="4"/>sinistro = Sinistro(numero='19', cliente='Chris', telefone='44 90898-0100')</text:p>
      <text:p text:style-name="Text_20_body"><text:s text:c="4"/>inserir_sinistro(sinistro)</text:p>
      <text:p text:style-name="Text_20_body"><text:s text:c="4"/>sinistro.inserir_peca(Peca(código=41, nome='terminal', categoria='Original', preco=90, mecânico_próprio=True))</text:p>
      <text:p text:style-name="Text_20_body"><text:s text:c="4"/>sinistro.inserir_peca(Peca(código=44, nome='barra axial', categoria='Original', preco=90, mecânico_próprio=True))</text:p>
      <text:p text:style-name="Text_20_body"/>
      <text:p text:style-name="Text_20_body"><text:s text:c="4"/>sinistro = Sinistro(numero='98', cliente='Redfield', telefone='66 91681-1198')</text:p>
      <text:p text:style-name="Text_20_body"><text:s text:c="4"/>inserir_sinistro(sinistro)</text:p>
      <text:p text:style-name="Text_20_body"><text:s text:c="4"/>sinistro.inserir_peca(Peca(código=51, nome='disco freio', categoria='Genuína', preco=150, mecânico_próprio=True))</text:p>
      <text:p text:style-name="Text_20_body"><text:s text:c="4"/>sinistro.inserir_peca(Peca(código=55, nome='pastilha freio', categoria='Genuína', preco=150, mecânico_próprio=True))</text:p>
      <text:p text:style-name="Text_20_body"/>
      <text:p text:style-name="Text_20_body">def cadastrar_orcamentos():</text:p>
      <text:p text:style-name="Text_20_body"><text:s text:c="4"/>criar_orcamento(numero_sinistro='1', nome_seguradora='Porto Seguro', data=Data(dia=12, mês=6, ano=2026))</text:p>
      <text:p text:style-name="Text_20_body"><text:s text:c="4"/>criar_orcamento(numero_sinistro='6', nome_seguradora='Bradesco Seguros', data=Data(dia=10, mês=10, ano=2026))</text:p>
      <text:p text:style-name="Text_20_body"><text:s text:c="4"/>criar_orcamento(numero_sinistro='11', nome_seguradora='SulAmérica', data=Data(dia=3, mês=8, ano=2026))</text:p>
      <text:p text:style-name="Text_20_body"><text:s text:c="4"/>criar_orcamento(numero_sinistro='19', nome_seguradora='Mapfre', data=Data(dia=2, mês=5, ano=2026))</text:p>
      <text:p text:style-name="Text_20_body"><text:s text:c="4"/>criar_orcamento(numero_sinistro='98', nome_seguradora='Allianz', data=Data(dia=28, mês=4, ano=2026))</text:p>
      <text:p text:style-name="Text_20_body"/>
      <text:p text:style-name="Text_20_body">if __name__ == '__main__':</text:p>
      <text:p text:style-name="Text_20_body"><text:s text:c="4"/>cadastrar_seguradoras()</text:p>
      <text:p text:style-name="Text_20_body"><text:s text:c="4"/>imprimir_objetos(cabeçalho= '\n Seguradoras: Nome <text:s/>- <text:s/>Cidade <text:s/>- <text:s/>Cobertura percentual', objetos=get_seguradoras().values())</text:p>
      <text:p text:style-name="Text_20_body"/>
      <text:p text:style-name="Text_20_body"><text:s text:c="4"/>cadastrar_sinistros()</text:p>
      <text:p text:style-name="Text_20_body"><text:s text:c="4"/>imprimir_objetos(cabeçalho='\n Sinistros: Número <text:s/>- <text:s/>Cliente <text:s/>- <text:s/>Telefone percentual',</text:p>
      <text:p text:style-name="Text_20_body"><text:s text:c="20"/>objetos=get_sinistros().values())</text:p>
      <text:p text:style-name="Text_20_body"/>
      <text:p text:style-name="Text_20_body"><text:s text:c="4"/>print('\n Sinistros: Número <text:s/>- <text:s/>Cliente <text:s/>- <text:s/>Telefone percentual')</text:p>
      <text:p text:style-name="Text_20_body"><text:s text:c="4"/>print(' - Pecas: Nome - Categoria - Preco - Mecânico Próprio')</text:p>
      <text:p text:style-name="Text_20_body"><text:soft-page-break/><text:s text:c="4"/>for índice, sinistro in enumerate(get_sinistros().values()):</text:p>
      <text:p text:style-name="Text_20_body"><text:s text:c="8"/>imprimir_objeto(índice=índice, objeto_str=sinistro)</text:p>
      <text:p text:style-name="Text_20_body"><text:s text:c="8"/>imprimir_objetos_internos(sinistro.pecas.values())</text:p>
      <text:p text:style-name="Text_20_body"/>
      <text:p text:style-name="Text_20_body"><text:s text:c="4"/>cadastrar_orcamentos()</text:p>
      <text:p text:style-name="Text_20_body"><text:s text:c="4"/>cabecalho_orcamento = ('Orcamento: Numero do Sinistro - Nome da Seguradora - Data do orcamento')</text:p>
      <text:p text:style-name="Text_20_body"><text:s text:c="4"/>cabecalho_orcamento_filtros = (cabecalho_orcamento + '\n -- Cobertura Percentual - Telefone no Sinistro - Precos das pecas')</text:p>
      <text:p text:style-name="Text_20_body"/>
      <text:p text:style-name="Text_20_body"><text:s text:c="4"/>imprimir_objetos('\n' + cabecalho_orcamento, get_orcamentos())</text:p>
      <text:p text:style-name="Text_20_body"><text:s text:c="4"/></text:p>
      <text:p text:style-name="Text_20_body"><text:s text:c="4"/>filtros, orcamentos_selecionados = selecionar_orcamento()</text:p>
      <text:p text:style-name="Text_20_body"><text:s text:c="4"/>imprimir_objetos_associação_filtros(cabecalho_orcamento_filtros, orcamentos_selecionados, filtros)</text:p>
      <text:p text:style-name="Text_20_body"/>
      <text:p text:style-name="Text_20_body"><text:s text:c="4"/>filtros, orcamentos_selecionados = selecionar_orcamento(data_mínima_orcamento=Data(dia=1, mês=5, ano=2026))</text:p>
      <text:p text:style-name="Text_20_body"><text:s text:c="4"/>imprimir_objetos_associação_filtros(cabecalho_orcamento_filtros, orcamentos_selecionados, filtros)</text:p>
      <text:p text:style-name="Text_20_body"/>
      <text:p text:style-name="Text_20_body"><text:s text:c="4"/>filtros, orcamentos_selecionados = selecionar_orcamento(Data(1, 5, 2026), valor_máximo_peca=255)</text:p>
      <text:p text:style-name="Text_20_body"><text:s text:c="4"/>imprimir_objetos_associação_filtros(cabecalho_orcamento_filtros, orcamentos_selecionados, filtros)</text:p>
      <text:p text:style-name="Text_20_body"/>
      <text:p text:style-name="Text_20_body"><text:s text:c="4"/>filtros, orcamentos_selecionados = selecionar_orcamento(Data(1, 5, 2026), 255, cobertura_mínima_seguradora=85)</text:p>
      <text:p text:style-name="Text_20_body"><text:s text:c="4"/>imprimir_objetos_associação_filtros(cabecalho_orcamento_filtros, orcamentos_selecionados, filtros)</text:p>
      <text:p text:style-name="Text_20_body"/>
      <text:p text:style-name="Text_20_body"><text:s text:c="4"/>filtros, orcamentos_selecionados = selecionar_orcamento(Data(1, 5, 2026), 255, 85, prefixo_telefone_cliente=67)</text:p>
      <text:p text:style-name="Text_20_body"><text:s text:c="4"/>imprimir_objetos_associação_filtros(cabecalho_orcamento_filtros, orcamentos_selecionados, filtros)</text:p>
      <text:p text:style-name="Text_20_body"/>
      <text:p text:style-name="P1">$$$ src.entidades.seguradora</text:p>
      <text:p text:style-name="Text_20_body">seguradoras = {}</text:p>
      <text:p text:style-name="Text_20_body"/>
      <text:p text:style-name="Text_20_body">def get_seguradoras(): return seguradoras</text:p>
      <text:p text:style-name="Text_20_body"/>
      <text:p text:style-name="Text_20_body">def inserir_seguradora(seguradora): </text:p>
      <text:p text:style-name="Text_20_body"><text:s text:c="4"/>nome_seguradora = seguradora.nome</text:p>
      <text:p text:style-name="Text_20_body"><text:s text:c="4"/>if nome_seguradora not in seguradoras.keys():</text:p>
      <text:p text:style-name="Text_20_body"><text:s text:c="8"/>seguradoras[nome_seguradora] = seguradora</text:p>
      <text:p text:style-name="Text_20_body"><text:s text:c="8"/>return True</text:p>
      <text:p text:style-name="Text_20_body"><text:s text:c="4"/>else:</text:p>
      <text:p text:style-name="Text_20_body"><text:s text:c="8"/>print('Seguradora ' + nome_seguradora + ' tem cadastro')</text:p>
      <text:p text:style-name="Text_20_body"><text:s text:c="8"/>return False</text:p>
      <text:p text:style-name="Text_20_body"/>
      <text:p text:style-name="Text_20_body">class Seguradora:</text:p>
      <text:p text:style-name="Text_20_body"><text:s text:c="4"/></text:p>
      <text:p text:style-name="Text_20_body"><text:s text:c="4"/>def __init__(self, nome, cidade, cobertura_percentual):</text:p>
      <text:p text:style-name="Text_20_body"><text:s text:c="8"/>self.nome = nome</text:p>
      <text:p text:style-name="Text_20_body"><text:s text:c="8"/>self.cidade = cidade</text:p>
      <text:p text:style-name="Text_20_body"><text:s text:c="8"/>self.cobertura_percentual = cobertura_percentual</text:p>
      <text:p text:style-name="Text_20_body"><text:s text:c="4"/></text:p>
      <text:p text:style-name="Text_20_body"><text:s text:c="4"/>def __str__(self):</text:p>
      <text:p text:style-name="Text_20_body"><text:s text:c="8"/>formato = '{} {:&lt;18} {} {:&lt;14} {} {:&lt;3} {}'</text:p>
      <text:p text:style-name="Text_20_body"><text:s text:c="8"/>seguradora_formatada = formato.format('|', self.nome, '|', self.cidade, '|', str(self.cobertura_percentual), '|')</text:p>
      <text:p text:style-name="Text_20_body"><text:s text:c="8"/>return seguradora_formatada</text:p>
      <text:p text:style-name="P1">$$$ src.entidades.peca</text:p>
      <text:p text:style-name="Text_20_body">class Peca:</text:p>
      <text:p text:style-name="Text_20_body"/>
      <text:p text:style-name="Text_20_body"><text:s text:c="4"/>def __init__(self, código, nome, categoria, preco, mecânico_próprio):</text:p>
      <text:p text:style-name="Text_20_body"><text:s text:c="8"/>self.código = código</text:p>
      <text:p text:style-name="Text_20_body"><text:s text:c="8"/>self.nome = nome</text:p>
      <text:p text:style-name="Text_20_body"><text:s text:c="8"/>self.categoria = categoria if categoria in ('Original', 'Genuína', 'OEM') else 'indefinida'</text:p>
      <text:p text:style-name="Text_20_body"><text:s text:c="8"/>self.preco = preco</text:p>
      <text:p text:style-name="Text_20_body"><text:s text:c="8"/>self.mecânico_próprio = mecânico_próprio</text:p>
      <text:p text:style-name="Text_20_body"/>
      <text:p text:style-name="Text_20_body"><text:s text:c="4"/>def __str__(self):</text:p>
      <text:p text:style-name="Text_20_body"><text:s text:c="8"/>if self.mecânico_próprio: mecânico_próprio_str = ' Mecânico Próprio |'</text:p>
      <text:p text:style-name="Text_20_body"><text:s text:c="8"/>else: mecânico_próprio_str = ''</text:p>
      <text:p text:style-name="Text_20_body"><text:s text:c="8"/>formato = ' <text:s text:c="2"/>{} {:&lt;15} {} {:&lt;12} {} {:&lt;6} {} {}'</text:p>
      <text:p text:style-name="Text_20_body"><text:s text:c="8"/>peca_formatado = formato.format('|', self.nome, '|', self.categoria, '|', self.preco, '|', mecânico_próprio_str)</text:p>
      <text:p text:style-name="Text_20_body"><text:s text:c="8"/>return peca_formatado</text:p>
      <text:p text:style-name="P1">$$$ src.entidades.orcamento</text:p>
      <text:p text:style-name="Text_20_body">from entidades.seguradora import get_seguradoras</text:p>
      <text:p text:style-name="Text_20_body">from entidades.sinistro import get_sinistros</text:p>
      <text:p text:style-name="Text_20_body"/>
      <text:p text:style-name="Text_20_body">orcamentos = []</text:p>
      <text:p text:style-name="Text_20_body"/>
      <text:p text:style-name="Text_20_body">def get_orcamentos(): return orcamentos</text:p>
      <text:p text:style-name="Text_20_body"/>
      <text:p text:style-name="Text_20_body">def inserir_orcamento(orcamento):</text:p>
      <text:p text:style-name="Text_20_body"><text:s text:c="4"/>if orcamento not in orcamentos: orcamentos.append(orcamento)</text:p>
      <text:p text:style-name="Text_20_body"><text:s text:c="4"/>else: print ('Orcamento de Pecas tem cadastro --- ' + str(orcamento))</text:p>
      <text:p text:style-name="Text_20_body"/>
      <text:p text:style-name="Text_20_body">def criar_orcamento(numero_sinistro, nome_seguradora, data):</text:p>
      <text:p text:style-name="Text_20_body"><text:s text:c="4"/>sinistro = get_sinistros().get(numero_sinistro)</text:p>
      <text:p text:style-name="Text_20_body"><text:s text:c="4"/>if sinistro is None:</text:p>
      <text:p text:style-name="Text_20_body"><text:s text:c="8"/>print('Sinistro ' + numero_sinistro + ' não cadastrado')</text:p>
      <text:p text:style-name="Text_20_body"><text:s text:c="8"/>return</text:p>
      <text:p text:style-name="Text_20_body"/>
      <text:p text:style-name="Text_20_body"><text:s text:c="4"/>seguradora = get_seguradoras().get(nome_seguradora)</text:p>
      <text:p text:style-name="Text_20_body"><text:s text:c="4"/>if seguradora is None:</text:p>
      <text:p text:style-name="Text_20_body"><text:s text:c="8"/>print('Seguradora ' + nome_seguradora + ' não cadastrada')</text:p>
      <text:p text:style-name="Text_20_body"><text:s text:c="8"/>return</text:p>
      <text:p text:style-name="Text_20_body"/>
      <text:p text:style-name="Text_20_body"><text:s text:c="4"/>orcamento = Orcamento(sinistro, seguradora, data)</text:p>
      <text:p text:style-name="Text_20_body"><text:s text:c="4"/>inserir_orcamento(orcamento)</text:p>
      <text:p text:style-name="Text_20_body"/>
      <text:p text:style-name="Text_20_body"/>
      <text:p text:style-name="Text_20_body">def selecionar_orcamento(data_mínima_orcamento=None, valor_máximo_peca=None, cobertura_mínima_seguradora=None, prefixo_telefone_cliente=None):</text:p>
      <text:p text:style-name="Text_20_body"><text:s text:c="4"/>filtros = '\nFiltros -- '</text:p>
      <text:p text:style-name="Text_20_body"><text:s text:c="4"/>if data_mínima_orcamento is not None: filtros += ' Data mínima do orcamento: ' + str(data_mínima_orcamento)</text:p>
      <text:p text:style-name="Text_20_body"><text:s text:c="4"/>if valor_máximo_peca is not None: filtros += ' Maior valor da peca: ' + str(valor_máximo_peca)</text:p>
      <text:p text:style-name="Text_20_body"><text:s text:c="4"/>if cobertura_mínima_seguradora is not None: filtros += '\n - Cobertura mínima da seguradora: ' + str(cobertura_mínima_seguradora)</text:p>
      <text:p text:style-name="Text_20_body"><text:s text:c="4"/>if prefixo_telefone_cliente is not None: filtros += (' - DDD telefone cliente: ' + str(prefixo_telefone_cliente))</text:p>
      <text:p text:style-name="Text_20_body"/>
      <text:p text:style-name="Text_20_body"><text:soft-page-break/><text:s text:c="4"/>orcamentos_selecionados = []</text:p>
      <text:p text:style-name="Text_20_body"><text:s text:c="4"/>for orcamento in orcamentos:</text:p>
      <text:p text:style-name="Text_20_body"><text:s text:c="8"/>if data_mínima_orcamento is not None and orcamento.data &lt; data_mínima_orcamento:</text:p>
      <text:p text:style-name="Text_20_body"><text:s text:c="12"/>continue</text:p>
      <text:p text:style-name="Text_20_body"/>
      <text:p text:style-name="Text_20_body"><text:s text:c="8"/>excluir_orcamento = False</text:p>
      <text:p text:style-name="Text_20_body"><text:s text:c="8"/>for peca in orcamento.sinistro.pecas.values():</text:p>
      <text:p text:style-name="Text_20_body"><text:s text:c="12"/>if valor_máximo_peca is not None and peca.preco &gt; valor_máximo_peca:</text:p>
      <text:p text:style-name="Text_20_body"><text:s text:c="16"/>excluir_orcamento = True</text:p>
      <text:p text:style-name="Text_20_body"><text:s text:c="16"/>break</text:p>
      <text:p text:style-name="Text_20_body"><text:s text:c="8"/>if excluir_orcamento:</text:p>
      <text:p text:style-name="Text_20_body"><text:s text:c="12"/>continue</text:p>
      <text:p text:style-name="Text_20_body"/>
      <text:p text:style-name="Text_20_body"><text:s text:c="8"/>if cobertura_mínima_seguradora is not None and orcamento.seguradora.cobertura_percentual &lt; cobertura_mínima_seguradora:</text:p>
      <text:p text:style-name="Text_20_body"><text:s text:c="12"/>continue</text:p>
      <text:p text:style-name="Text_20_body"><text:s text:c="8"/>if prefixo_telefone_cliente is not None and not orcamento.sinistro.telefone.startswith(str(prefixo_telefone_cliente)):</text:p>
      <text:p text:style-name="Text_20_body"><text:s text:c="12"/>continue</text:p>
      <text:p text:style-name="Text_20_body"/>
      <text:p text:style-name="Text_20_body"><text:s text:c="8"/>orcamentos_selecionados.append(orcamento)</text:p>
      <text:p text:style-name="Text_20_body"><text:s text:c="4"/>return filtros, orcamentos_selecionados</text:p>
      <text:p text:style-name="Text_20_body"/>
      <text:p text:style-name="Text_20_body"/>
      <text:p text:style-name="Text_20_body">class Orcamento:</text:p>
      <text:p text:style-name="Text_20_body"/>
      <text:p text:style-name="Text_20_body"><text:s text:c="4"/>def __init__(self, sinistro, seguradora, data):</text:p>
      <text:p text:style-name="Text_20_body"><text:s text:c="8"/>self.sinistro = sinistro</text:p>
      <text:p text:style-name="Text_20_body"><text:s text:c="8"/>self.seguradora = seguradora</text:p>
      <text:p text:style-name="Text_20_body"><text:s text:c="8"/>self.data = data</text:p>
      <text:p text:style-name="Text_20_body"/>
      <text:p text:style-name="Text_20_body"><text:s text:c="4"/>def __str__(self):</text:p>
      <text:p text:style-name="Text_20_body"><text:s text:c="8"/>formato = '{} {:&lt;15} {} {:&lt;19} {} {:&lt;10} {}'</text:p>
      <text:p text:style-name="Text_20_body"><text:s text:c="8"/>mostra_formato = formato.format('|', self.sinistro.numero, '|', self.seguradora.nome, '|', str(self.data), '|')</text:p>
      <text:p text:style-name="Text_20_body"><text:s text:c="8"/>return mostra_formato</text:p>
      <text:p text:style-name="Text_20_body"/>
      <text:p text:style-name="Text_20_body"><text:s text:c="4"/>def str_atributos_pecas(self):</text:p>
      <text:p text:style-name="Text_20_body"><text:soft-page-break/><text:s text:c="8"/>atributos_pecas_str = ''</text:p>
      <text:p text:style-name="Text_20_body"><text:s text:c="8"/>for indice, peca in enumerate(self.sinistro.pecas.values()):</text:p>
      <text:p text:style-name="Text_20_body"><text:s text:c="12"/>if indice &gt; 0:</text:p>
      <text:p text:style-name="Text_20_body"><text:s text:c="16"/>atributos_pecas_str += ' - '</text:p>
      <text:p text:style-name="Text_20_body"><text:s text:c="12"/>atributos_pecas_str += f'R$ {peca.preco:3d}'</text:p>
      <text:p text:style-name="Text_20_body"><text:s text:c="8"/>return atributos_pecas_str</text:p>
      <text:p text:style-name="Text_20_body"/>
      <text:p text:style-name="Text_20_body"><text:s text:c="4"/>def str_filtro(self):</text:p>
      <text:p text:style-name="Text_20_body"><text:s text:c="8"/>formato = '{:&gt;2} {} {:&lt;11} {} {:&lt;15} {}'</text:p>
      <text:p text:style-name="Text_20_body"><text:s text:c="8"/>filtro_formatado = formato.format(</text:p>
      <text:p text:style-name="Text_20_body"><text:s text:c="12"/>str(self.seguradora.cobertura_percentual),</text:p>
      <text:p text:style-name="Text_20_body"><text:s text:c="12"/>'|', self.sinistro.telefone, '|', self.str_atributos_pecas(), '|'</text:p>
      <text:p text:style-name="Text_20_body"><text:s text:c="8"/>)</text:p>
      <text:p text:style-name="Text_20_body"><text:s text:c="8"/>return self.__str__() + filtro_formatado</text:p>
      <text:p text:style-name="P1">$$$ src.entidades.sinistro</text:p>
      <text:p text:style-name="Text_20_body">sinistros = {}</text:p>
      <text:p text:style-name="Text_20_body"/>
      <text:p text:style-name="Text_20_body">def get_sinistros (): return sinistros</text:p>
      <text:p text:style-name="Text_20_body"/>
      <text:p text:style-name="Text_20_body">def inserir_sinistro(sinistro):</text:p>
      <text:p text:style-name="Text_20_body"><text:s text:c="4"/>numero_sisnitro = sinistro.numero</text:p>
      <text:p text:style-name="Text_20_body"><text:s text:c="4"/>if numero_sisnitro not in sinistros.keys():</text:p>
      <text:p text:style-name="Text_20_body"><text:s text:c="8"/>sinistros[numero_sisnitro] = sinistro</text:p>
      <text:p text:style-name="Text_20_body"><text:s text:c="8"/>return True</text:p>
      <text:p text:style-name="Text_20_body"><text:s text:c="4"/>else:</text:p>
      <text:p text:style-name="Text_20_body"><text:s text:c="8"/>print('Sinistro ' + numero_sisnitro + ' já tem cadastro')</text:p>
      <text:p text:style-name="Text_20_body"><text:s text:c="8"/>return False</text:p>
      <text:p text:style-name="Text_20_body"/>
      <text:p text:style-name="Text_20_body">class Sinistro:</text:p>
      <text:p text:style-name="Text_20_body"/>
      <text:p text:style-name="Text_20_body"><text:s text:c="4"/>def __init__(self, numero, cliente, telefone):</text:p>
      <text:p text:style-name="Text_20_body"><text:s text:c="8"/>self.numero = numero</text:p>
      <text:p text:style-name="Text_20_body"><text:s text:c="8"/>self.cliente = cliente</text:p>
      <text:p text:style-name="Text_20_body"><text:s text:c="8"/>self.telefone = telefone</text:p>
      <text:p text:style-name="Text_20_body"><text:s text:c="8"/>self.pecas = {}</text:p>
      <text:p text:style-name="Text_20_body"/>
      <text:p text:style-name="Text_20_body"><text:s text:c="4"/>def __str__(self):</text:p>
      <text:p text:style-name="Text_20_body"><text:s text:c="8"/>formato = '{} {:&lt;3} {} {:&lt;15} {} {:&lt;14}'</text:p>
      <text:p text:style-name="Text_20_body"><text:s text:c="8"/>sinistro_formatado = formato.format('|', self.numero, '|', self.cliente, '|', self.telefone) <text:s text:c="5"/></text:p>
      <text:p text:style-name="Text_20_body"><text:s text:c="8"/>return sinistro_formatado</text:p>
      <text:p text:style-name="Text_20_body"><text:s text:c="4"/></text:p>
      <text:p text:style-name="Text_20_body"><text:s text:c="4"/>def inserir_peca(self, peca):</text:p>
      <text:p text:style-name="Text_20_body"><text:s text:c="8"/>nome_peca = peca.nome</text:p>
      <text:p text:style-name="Text_20_body"><text:s text:c="8"/>if nome_peca not in self.pecas.keys(): self.pecas[nome_peca] = peca</text:p>
      <text:p text:style-name="Text_20_body"><text:s text:c="8"/>else: print('Nome ' + nome_peca + ' já foi cadastrada em Sinistro')</text:p>
      <text:p text:style-name="P1">$$$ src.util.data</text:p>
      <text:p text:style-name="Text_20_body">from datetime import date</text:p>
      <text:p text:style-name="Text_20_body"/>
      <text:p text:style-name="Text_20_body">class Data:</text:p>
      <text:p text:style-name="Text_20_body"><text:s text:c="4"/>def __init__(self, dia, mês, ano):</text:p>
      <text:p text:style-name="Text_20_body"><text:s text:c="8"/>self.dia = dia</text:p>
      <text:p text:style-name="Text_20_body"><text:s text:c="8"/>self.mês = mês</text:p>
      <text:p text:style-name="Text_20_body"><text:s text:c="8"/>self.ano = ano</text:p>
      <text:p text:style-name="Text_20_body"/>
      <text:p text:style-name="Text_20_body"><text:s text:c="4"/>def __str__(self):</text:p>
      <text:p text:style-name="Text_20_body"><text:s text:c="8"/>if self.dia &lt; 10: data_str = '0' + str(self.dia)</text:p>
      <text:p text:style-name="Text_20_body"><text:s text:c="8"/>else: data_str = str(self.dia)</text:p>
      <text:p text:style-name="Text_20_body"><text:s text:c="8"/>if self.mês &lt; 10: data_str += "/0" + str(self.mês) + "/"</text:p>
      <text:p text:style-name="Text_20_body"><text:s text:c="8"/>else: data_str += "/" + str(self.mês) + "/"</text:p>
      <text:p text:style-name="Text_20_body"><text:s text:c="8"/>data_str += str(self.ano)</text:p>
      <text:p text:style-name="Text_20_body"><text:s text:c="8"/>return data_str</text:p>
      <text:p text:style-name="Text_20_body"/>
      <text:p text:style-name="Text_20_body"><text:s text:c="4"/>def __eq__(self, data):</text:p>
      <text:p text:style-name="Text_20_body"><text:s text:c="8"/>if self.dia == data.dia and self.mês == data.mês and self.ano == data.ano: return True</text:p>
      <text:p text:style-name="Text_20_body"><text:s text:c="8"/>return False</text:p>
      <text:p text:style-name="Text_20_body"/>
      <text:p text:style-name="Text_20_body"><text:s text:c="4"/>def __ne__(self, data): return not self == data</text:p>
      <text:p text:style-name="Text_20_body"><text:s text:c="3"/></text:p>
      <text:p text:style-name="Text_20_body"><text:s text:c="4"/>def __gt__(self, data):</text:p>
      <text:p text:style-name="Text_20_body"><text:s text:c="8"/>if self.ano &gt; data.ano: return True</text:p>
      <text:p text:style-name="Text_20_body"><text:s text:c="8"/>elif self.ano &lt; data.ano: return False</text:p>
      <text:p text:style-name="Text_20_body"><text:s text:c="8"/>if self.mês &gt; data.mês: return True</text:p>
      <text:p text:style-name="Text_20_body"><text:s text:c="8"/>elif self.mês &lt; data.mês: return False</text:p>
      <text:p text:style-name="Text_20_body"><text:s text:c="8"/>if self.dia &gt; data.dia: return True</text:p>
      <text:p text:style-name="Text_20_body"><text:s text:c="8"/>elif self.dia &lt; data.dia: return False</text:p>
      <text:p text:style-name="Text_20_body"><text:s text:c="8"/>return False</text:p>
      <text:p text:style-name="Text_20_body"/>
      <text:p text:style-name="Text_20_body"><text:s text:c="4"/>def __lt__(self, data):</text:p>
      <text:p text:style-name="Text_20_body"><text:s text:c="8"/>if self.ano &lt; data.ano: return True</text:p>
      <text:p text:style-name="Text_20_body"><text:s text:c="8"/>elif self.ano &gt; data.ano: return False</text:p>
      <text:p text:style-name="Text_20_body"><text:s text:c="8"/>if self.mês &lt; data.mês: return True</text:p>
      <text:p text:style-name="Text_20_body"><text:s text:c="8"/>elif self.mês &gt; data.mês: return False</text:p>
      <text:p text:style-name="Text_20_body"><text:soft-page-break/><text:s text:c="8"/>if self.dia &lt; data.dia: return True</text:p>
      <text:p text:style-name="Text_20_body"><text:s text:c="8"/>elif self.ano &gt; data.ano: return False</text:p>
      <text:p text:style-name="Text_20_body"><text:s text:c="8"/>return False</text:p>
      <text:p text:style-name="Text_20_body"/>
      <text:p text:style-name="Text_20_body"><text:s text:c="4"/>def __ge__(self, data):</text:p>
      <text:p text:style-name="Text_20_body"><text:s text:c="8"/>if self &lt; data: return False</text:p>
      <text:p text:style-name="Text_20_body"><text:s text:c="8"/>else: return True</text:p>
      <text:p text:style-name="Text_20_body"><text:s text:c="8"/></text:p>
      <text:p text:style-name="Text_20_body"><text:s text:c="4"/>def __le__(self, data):</text:p>
      <text:p text:style-name="Text_20_body"><text:s text:c="8"/>if self &gt; data: return False</text:p>
      <text:p text:style-name="Text_20_body"><text:s text:c="8"/>else: return True</text:p>
      <text:p text:style-name="Text_20_body"/>
      <text:p text:style-name="Text_20_body"><text:s text:c="4"/>def calcular_idade(self, data_referência=None):</text:p>
      <text:p text:style-name="Text_20_body"><text:s text:c="8"/>if data_referência is None:</text:p>
      <text:p text:style-name="Text_20_body"><text:s text:c="12"/>dia_atual_str, mês_atual_str, ano_atual_str = date.today().strftime("%d/%m/%Y").split('/') </text:p>
      <text:p text:style-name="Text_20_body"><text:s text:c="12"/>dia_referência, mês_referência, ano_referência = int(dia_atual_str), int(mês_atual_str), int(ano_atual_str)</text:p>
      <text:p text:style-name="Text_20_body"><text:s text:c="8"/>else:</text:p>
      <text:p text:style-name="Text_20_body"><text:s text:c="12"/>dia_referência, mês_referência, ano_referência = data_referência.dia, data_referência.mês, data_referência.ano</text:p>
      <text:p text:style-name="Text_20_body"><text:s text:c="12"/>idade = ano_referência - self.ano</text:p>
      <text:p text:style-name="Text_20_body"><text:s text:c="8"/>if mês_referência &lt; self.mês or (mês_referência == self.mês and dia_referência &lt; self.dia): idade -= 1</text:p>
      <text:p text:style-name="Text_20_body"><text:s text:c="8"/>return idade</text:p>
      <text:p text:style-name="P1">$$$ src.util.gerais</text:p>
      <text:p text:style-name="Text_20_body">def imprimir_objetos(cabeçalho, objetos, filtros=None):</text:p>
      <text:p text:style-name="Text_20_body"><text:s text:c="4"/>if filtros is not None: print(filtros)</text:p>
      <text:p text:style-name="Text_20_body"><text:s text:c="4"/>print(cabeçalho)</text:p>
      <text:p text:style-name="Text_20_body"><text:s text:c="4"/>for indice, objeto in enumerate(objetos): </text:p>
      <text:p text:style-name="Text_20_body"><text:s text:c="8"/>imprimir_objeto(indice, str(objeto))</text:p>
      <text:p text:style-name="Text_20_body"/>
      <text:p text:style-name="Text_20_body">def imprimir_objeto(índice, objeto_str):</text:p>
      <text:p text:style-name="Text_20_body"><text:s text:c="4"/>formato = '{} {} {}'</text:p>
      <text:p text:style-name="Text_20_body"><text:s text:c="4"/>ordem = índice + 1</text:p>
      <text:p text:style-name="Text_20_body"><text:s text:c="4"/>separador = '_'</text:p>
      <text:p text:style-name="Text_20_body"><text:s text:c="4"/>string_formatado = formato.format(f'{ordem:2d}', separador, objeto_str)</text:p>
      <text:p text:style-name="Text_20_body"><text:s text:c="4"/>print(string_formatado)</text:p>
      <text:p text:style-name="Text_20_body"/>
      <text:p text:style-name="Text_20_body">def imprimir_objetos_associação_filtros(cabeçalho, objetos, filtros=None):</text:p>
      <text:p text:style-name="Text_20_body"><text:s text:c="4"/>if filtros is not None: print(filtros)</text:p>
      <text:p text:style-name="Text_20_body"><text:s text:c="4"/>print(cabeçalho)</text:p>
      <text:p text:style-name="Text_20_body"><text:s text:c="4"/>for índice, objeto in enumerate(objetos):</text:p>
      <text:p text:style-name="Text_20_body"><text:s text:c="8"/>imprimir_objeto(índice, objeto.str_filtro())</text:p>
      <text:p text:style-name="Text_20_body"/>
      <text:p text:style-name="Text_20_body">def imprimir_objetos_internos (objetos):</text:p>
      <text:p text:style-name="Text_20_body"><text:s text:c="4"/>for objeto in objetos: print(' -' + str(objeto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Farias de Oliveira</meta:initial-creator>
    <meta:creation-date>2026-04-07T19:47:56</meta:creation-date>
    <dc:date>2026-04-28T19:47:02.62</dc:date>
    <meta:editing-duration>PT32M47S</meta:editing-duration>
    <meta:editing-cycles>14</meta:editing-cycles>
    <meta:generator>OpenOffice/4.1.16$Win32 OpenOffice.org_project/4116m3$Build-9816</meta:generator>
    <meta:document-statistic meta:table-count="0" meta:image-count="0" meta:object-count="0" meta:page-count="12" meta:paragraph-count="264" meta:word-count="1184" meta:character-count="13800"/>
  </office:meta>
</office:document-meta>
</file>