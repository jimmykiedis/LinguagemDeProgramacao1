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guagem de Programação I - Etapa 2 - Leonardo Farias de Oliveira</text:p>
      <text:p text:style-name="P1"/>
      <text:p text:style-name="P1">Projeto : Orçamento de Peças de um Sinistro para uma Seguradora</text:p>
      <text:p text:style-name="P1"/>
      <text:p text:style-name="P1">Entidades</text:p>
      <text:list xml:id="list3608271048650891270" text:style-name="L1">
        <text:list-item>
          <text:p text:style-name="P2">Sinistro</text:p>
        </text:list-item>
        <text:list-item>
          <text:p text:style-name="P2">Seguradora</text:p>
        </text:list-item>
        <text:list-item>
          <text:p text:style-name="P2">PeçaSinistro : PeçasSinistros</text:p>
        </text:list-item>
        <text:list-item>
          <text:p text:style-name="P2">PeçaCarro : PeçasCarro</text:p>
        </text:list-item>
        <text:list-item>
          <text:p text:style-name="P2">PeçaMoto : PeçasMoto</text:p>
        </text:list-item>
        <text:list-item>
          <text:p text:style-name="P2">OrçamentoSinistro</text:p>
        </text:list-item>
      </text:list>
      <text:p text:style-name="P1"/>
      <text:p text:style-name="P1">Relacionamentos</text:p>
      <text:list xml:id="list1354540192" text:style-name="L1">
        <text:list-item>
          <text:p text:style-name="P2">Sem Referências : Seguradora, Peca</text:p>
        </text:list-item>
        <text:list-item>
          <text:p text:style-name="P2">Relacionamento Múltiplo : Sinistro [1:n] Peca</text:p>
        </text:list-item>
        <text:list-item>
          <text:p text:style-name="P2">Associação : Orcamento [Sinistro, Seguradora]</text:p>
        </text:list-item>
        <text:list-item>
          <text:p text:style-name="P2">Herança : Peça [PeçaMecânica, PeçaLataria]</text:p>
        </text:list-item>
      </text:list>
      <text:p text:style-name="P1"/>
      <text:p text:style-name="P1">Atributos e Referências</text:p>
      <text:list xml:id="list1400731351" text:style-name="L1">
        <text:list-item>
          <text:p text:style-name="P2">Sinistro: <text:span text:style-name="T2">segurado</text:span>, data, cidade, <text:span text:style-name="T1">peças</text:span></text:p>
        </text:list-item>
        <text:list-item>
          <text:p text:style-name="P2">Seguradora: <text:span text:style-name="T2">nome</text:span>, cidade, cobertura_percentual</text:p>
        </text:list-item>
        <text:list-item>
          <text:p text:style-name="P2">Peça: <text:span text:style-name="T2">código</text:span>, <text:span text:style-name="T3">nome</text:span>, marca, preço</text:p>
        </text:list-item>
        <text:list-item>
          <text:p text:style-name="P2">PeçaMecânica : tipo_peça_mecânica, mecânico_próprio</text:p>
        </text:list-item>
        <text:list-item>
          <text:p text:style-name="P2">PeçaLataria : tipo_peça_lataria, funileiro_próprio</text:p>
        </text:list-item>
        <text:list-item>
          <text:p text:style-name="P2">Orçamento: data, <text:span text:style-name="T1">sinistro, seguradora</text:span></text:p>
        </text:list-item>
      </text:list>
      <text:p text:style-name="P1"/>
      <text:p text:style-name="P1">Enumerados</text:p>
      <text:list xml:id="list346460450" text:style-name="L1">
        <text:list-item>
          <text:p text:style-name="P2">tipo_peça_carro: farol, parachoques, capo, lanternas, portas</text:p>
        </text:list-item>
        <text:list-item>
          <text:p text:style-name="P2">tipo_peça_moto: escapamento, pistão, biela, cabeçote</text:p>
        </text:list-item>
        <text:list-item>
          <text:p text:style-name="P2">categorias_peca: original, genuína, O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6$Win32 OpenOffice.org_project/4116m3$Build-9816</meta:generator>
    <meta:initial-creator>Joinvile Batista Junior</meta:initial-creator>
    <dc:date>2026-04-28T19:51:30.34</dc:date>
    <meta:editing-duration>PT43M12S</meta:editing-duration>
    <meta:editing-cycles>13</meta:editing-cycles>
    <meta:document-statistic meta:table-count="0" meta:image-count="0" meta:object-count="0" meta:page-count="1" meta:paragraph-count="25" meta:word-count="122" meta:character-count="883"/>
  </office:meta>
</office:document-meta>
</file>