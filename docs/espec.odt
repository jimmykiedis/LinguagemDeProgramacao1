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e Programação I - Etapa 2 - Leonardo Farias de Oliveira</text:p>
      <text:p text:style-name="P1"/>
      <text:p text:style-name="P1">Projeto : Orçamento de Peças de um Sinistro para uma Seguradora</text:p>
      <text:p text:style-name="P1"/>
      <text:p text:style-name="P1">Entidades</text:p>
      <text:list xml:id="list6730907540963982574" text:style-name="L1">
        <text:list-item>
          <text:p text:style-name="P3">Sinistro</text:p>
        </text:list-item>
        <text:list-item>
          <text:p text:style-name="P3">Seguradora</text:p>
        </text:list-item>
        <text:list-item>
          <text:p text:style-name="P3">PeçaSinistro : PeçasSinistros</text:p>
        </text:list-item>
        <text:list-item>
          <text:p text:style-name="P3">PeçaCarro : PeçasCarro</text:p>
        </text:list-item>
        <text:list-item>
          <text:p text:style-name="P3">PeçaMoto : PeçasMoto</text:p>
        </text:list-item>
        <text:list-item>
          <text:p text:style-name="P3">OrçamentoSinistro</text:p>
        </text:list-item>
      </text:list>
      <text:p text:style-name="P1"/>
      <text:p text:style-name="P1">Relacionamentos</text:p>
      <text:list xml:id="list1354540192" text:style-name="L1">
        <text:list-item>
          <text:p text:style-name="P3">Sem Referências : Seguradora, Peça</text:p>
        </text:list-item>
        <text:list-item>
          <text:p text:style-name="P3">Relacionamento Múltiplo : Sinistro [1:n] Peça</text:p>
        </text:list-item>
        <text:list-item>
          <text:p text:style-name="P3">Associação : Orçamento [Sinistro, Seguradora]</text:p>
        </text:list-item>
        <text:list-item>
          <text:p text:style-name="P3">Herança : Peça [PeçaMecânica, PeçaLataria]</text:p>
        </text:list-item>
      </text:list>
      <text:p text:style-name="P1"/>
      <text:p text:style-name="P1">Atributos e Referências</text:p>
      <text:list xml:id="list1400731351" text:style-name="L1">
        <text:list-item>
          <text:p text:style-name="P3">Sinistro: <text:span text:style-name="T2">segurado</text:span>, data, cidade, <text:span text:style-name="T1">peças</text:span></text:p>
        </text:list-item>
        <text:list-item>
          <text:p text:style-name="P3">Seguradora: <text:span text:style-name="T2">nome</text:span>, cidade, cobertura_percentual</text:p>
        </text:list-item>
        <text:list-item>
          <text:p text:style-name="P3">Peça: <text:span text:style-name="T2">nome</text:span>, marca, preço, tipo</text:p>
        </text:list-item>
        <text:list-item>
          <text:p text:style-name="P3">PeçaMecânica : tipo_peça_mecânica, mecânico_próprio</text:p>
        </text:list-item>
        <text:list-item>
          <text:p text:style-name="P3">PeçaLataria : tipo_peça_lataria, funileiro_próprio</text:p>
        </text:list-item>
        <text:list-item>
          <text:p text:style-name="P3">Orçamento: data, <text:span text:style-name="T1">sinistro, seguradora</text:span></text:p>
        </text:list-item>
      </text:list>
      <text:p text:style-name="P1"/>
      <text:p text:style-name="P1">Enumerados</text:p>
      <text:list xml:id="list346460450" text:style-name="L1">
        <text:list-item>
          <text:p text:style-name="P3">tipo_peça_carro: farol, parachoques, capo, lanternas, portas</text:p>
        </text:list-item>
        <text:list-item>
          <text:p text:style-name="P3">tipo_peça_moto: escapamento, pistão, biela, cabeçote</text:p>
        </text:list-item>
        <text:list-item>
          <text:p text:style-name="P3">categorias_peca: original, genuína, O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Win32 OpenOffice.org_project/4116m3$Build-9816</meta:generator>
    <meta:initial-creator>Joinvile Batista Junior</meta:initial-creator>
    <dc:date>2026-04-07T21:17:13.52</dc:date>
    <meta:editing-duration>PT39M23S</meta:editing-duration>
    <meta:editing-cycles>9</meta:editing-cycles>
    <meta:document-statistic meta:table-count="0" meta:image-count="0" meta:object-count="0" meta:page-count="1" meta:paragraph-count="25" meta:word-count="122" meta:character-count="881"/>
  </office:meta>
</office:document-meta>
</file>