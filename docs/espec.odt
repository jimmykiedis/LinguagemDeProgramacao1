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" svg:font-family="Times"/>
    <style:font-face style:name="Times New Roman" svg:font-family="'Times New Roman'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/>
    </style:style>
    <style:style style:name="P2" style:family="paragraph" style:parent-style-name="Standard" style:list-style-name="L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font-name="Times New Roman" fo:font-size="12pt"/>
    </style:style>
    <style:style style:name="T1" style:family="text">
      <style:text-properties fo:font-weight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text:list-style style:name="L1">
      <text:list-level-style-bullet text:level="1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guagem de Programação I - Etapa 2 - Leonardo Farias de Oliveira</text:p>
      <text:p text:style-name="P1"/>
      <text:p text:style-name="P1">Projeto : Orçamento de Peças de um Sinistro para uma Seguradora</text:p>
      <text:p text:style-name="P1"/>
      <text:p text:style-name="P1">Entidades</text:p>
      <text:list xml:id="list7563943540792055132" text:style-name="L1">
        <text:list-item>
          <text:p text:style-name="P2">Sinistro</text:p>
        </text:list-item>
        <text:list-item>
          <text:p text:style-name="P2">Seguradora</text:p>
        </text:list-item>
        <text:list-item>
          <text:p text:style-name="P2">PeçaSinistro : PeçasSinistros</text:p>
        </text:list-item>
        <text:list-item>
          <text:p text:style-name="P2">PeçaCarro : PeçasCarro</text:p>
        </text:list-item>
        <text:list-item>
          <text:p text:style-name="P2">PeçaMoto : PeçasMoto</text:p>
        </text:list-item>
        <text:list-item>
          <text:p text:style-name="P2">OrçamentoSinistro</text:p>
        </text:list-item>
      </text:list>
      <text:p text:style-name="P1"/>
      <text:p text:style-name="P1">Relacionamentos</text:p>
      <text:list xml:id="list1354540192" text:style-name="L1">
        <text:list-item>
          <text:p text:style-name="P2">Sem Referências : Seguradora, Peca</text:p>
        </text:list-item>
        <text:list-item>
          <text:p text:style-name="P2">Relacionamento Múltiplo : Sinistro [1:n] Peça</text:p>
        </text:list-item>
        <text:list-item>
          <text:p text:style-name="P2">Associação : Orcamento [Sinistro, Seguradora]</text:p>
        </text:list-item>
        <text:list-item>
          <text:p text:style-name="P2">Herança : Peça [PeçaMecânica, PeçaLataria]</text:p>
        </text:list-item>
      </text:list>
      <text:p text:style-name="P1"/>
      <text:p text:style-name="P1">Atributos e Referências</text:p>
      <text:list xml:id="list1400731351" text:style-name="L1">
        <text:list-item>
          <text:p text:style-name="P2">Sinistro: <text:span text:style-name="T2">segurado</text:span>, data, cidade, <text:span text:style-name="T1">peças</text:span></text:p>
        </text:list-item>
        <text:list-item>
          <text:p text:style-name="P2">Seguradora: <text:span text:style-name="T2">nome</text:span>, cidade, cobertura_percentual</text:p>
        </text:list-item>
        <text:list-item>
          <text:p text:style-name="P2">Peça: <text:span text:style-name="T2">código</text:span>, <text:span text:style-name="T3">nome</text:span>, marca, preço</text:p>
        </text:list-item>
        <text:list-item>
          <text:p text:style-name="P2">PeçaMecânica : tipo_peça_mecânica, mecânico_próprio</text:p>
        </text:list-item>
        <text:list-item>
          <text:p text:style-name="P2">PeçaLataria : tipo_peça_lataria, funileiro_próprio</text:p>
        </text:list-item>
        <text:list-item>
          <text:p text:style-name="P2">Orçamento: data, <text:span text:style-name="T1">sinistro, seguradora</text:span></text:p>
        </text:list-item>
      </text:list>
      <text:p text:style-name="P1"/>
      <text:p text:style-name="P1">Enumerados</text:p>
      <text:list xml:id="list346460450" text:style-name="L1">
        <text:list-item>
          <text:p text:style-name="P2">tipo_peça_carro: farol, parachoques, capo, lanternas, portas</text:p>
        </text:list-item>
        <text:list-item>
          <text:p text:style-name="P2">tipo_peça_moto: escapamento, pistão, biela, cabeçote</text:p>
        </text:list-item>
        <text:list-item>
          <text:p text:style-name="P2">categorias_peca: original, genuína, OEM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" svg:font-family="Times"/>
    <style:font-face style:name="Times New Roman" svg:font-family="'Times New Roman'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6$Win32 OpenOffice.org_project/4116m3$Build-9816</meta:generator>
    <meta:initial-creator>Joinvile Batista Junior</meta:initial-creator>
    <dc:date>2026-04-28T20:02:04.95</dc:date>
    <meta:editing-duration>PT43M26S</meta:editing-duration>
    <meta:editing-cycles>15</meta:editing-cycles>
    <meta:document-statistic meta:table-count="0" meta:image-count="0" meta:object-count="0" meta:page-count="1" meta:paragraph-count="25" meta:word-count="122" meta:character-count="883"/>
  </office:meta>
</office:document-meta>
</file>