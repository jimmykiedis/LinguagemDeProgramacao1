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guagem de Programação I - Etapa 1 - Paulo de Souza Assunção</text:p>
      <text:p text:style-name="Standard"/>
      <text:p text:style-name="Standard">Projeto : Apresentação de Peças Musicais de um Repertório por um Maestro</text:p>
      <text:p text:style-name="Standard"/>
      <text:p text:style-name="Standard">Entidades</text:p>
      <text:list xml:id="list7765843968652200134" text:style-name="L1">
        <text:list-item>
          <text:p text:style-name="P1">ApresentaçãoMusical : ApresentaçõesMusicais</text:p>
        </text:list-item>
        <text:list-item>
          <text:p text:style-name="P1">Maestro</text:p>
        </text:list-item>
        <text:list-item>
          <text:p text:style-name="P1">PeçaMusical : PeçasMusicais</text:p>
        </text:list-item>
        <text:list-item>
          <text:p text:style-name="P1">PeçaMusicalClássica : PeçasMusicaisClássicas</text:p>
        </text:list-item>
        <text:list-item>
          <text:p text:style-name="P1">PeçaMusicalPopular : PeçasMusicaisPopulares</text:p>
        </text:list-item>
        <text:list-item>
          <text:p text:style-name="P1">Repertório</text:p>
        </text:list-item>
      </text:list>
      <text:p text:style-name="Standard"/>
      <text:p text:style-name="Standard">Relacionamentos</text:p>
      <text:list xml:id="list3779552150213900910" text:style-name="L2">
        <text:list-item>
          <text:p text:style-name="P2">Sem Referências : PeçaMusical, Maestro</text:p>
        </text:list-item>
        <text:list-item>
          <text:p text:style-name="P2">Relacionamento Múltiplo : Repertório [n:n] PeçaMusical</text:p>
        </text:list-item>
        <text:list-item>
          <text:p text:style-name="P2">Associação : ApresentaçãoMusical [Repertório, Maestro]</text:p>
        </text:list-item>
        <text:list-item>
          <text:p text:style-name="P2">Herança : PeçaMusical [PeçaMusicalClássica, PeçaMusicalPopular]</text:p>
        </text:list-item>
      </text:list>
      <text:p text:style-name="Standard"/>
      <text:p text:style-name="Standard">Atributos e Referências</text:p>
      <text:list xml:id="list8455101249083165541" text:style-name="L3">
        <text:list-item>
          <text:p text:style-name="P3">ApresentaçãoMusical: data, <text:span text:style-name="T1">repertório</text:span>, <text:span text:style-name="T1">maestro</text:span></text:p>
        </text:list-item>
        <text:list-item>
          <text:p text:style-name="P3">Maestro: <text:span text:style-name="T2">nome</text:span>, anos_experiência, estrangeiro</text:p>
        </text:list-item>
        <text:list-item>
          <text:p text:style-name="P3">PeçaMusical: <text:span text:style-name="T2">título</text:span>, compositor, duração, tom</text:p>
        </text:list-item>
        <text:list-item>
          <text:p text:style-name="P3">PeçaMusicalClássica : estilo_música_clássica, muito_conhecida</text:p>
        </text:list-item>
        <text:list-item>
          <text:p text:style-name="P3">PeçaMusicalPopular : estilo_música_popular, instrumentação_característica</text:p>
        </text:list-item>
        <text:list-item>
          <text:p text:style-name="P3">Repertório: <text:span text:style-name="T2">título</text:span>, data_montagem, mesmo_compositor, <text:span text:style-name="T1">peças_musicais</text:span></text:p>
        </text:list-item>
      </text:list>
      <text:p text:style-name="Standard"/>
      <text:p text:style-name="Standard">Enumerados</text:p>
      <text:list xml:id="list7187584570627023308" text:style-name="L4">
        <text:list-item>
          <text:p text:style-name="P4">estilo_musica_clássica : barroco, romântico, clássico, moderno</text:p>
        </text:list-item>
        <text:list-item>
          <text:p text:style-name="P4">estilo_musica_popular : pop, rock, country, reggae, blues, jazz</text:p>
        </text:list-item>
        <text:list-item>
          <text:p text:style-name="P4">instrumentação_característica : guitarra elétrica, bateria, baixo, teclado, saxofone, violão,</text:p>
          <text:p text:style-name="P4">trompete, piano, violino, contrabaixo</text:p>
        </text:list-item>
      </text:list>
      <text:p text:style-name="Standard"/>
      <text:p text:style-name="Standard">Cidade, dd/mm/2026</text:p>
      <text:p text:style-name="Standard"/>
      <text:p text:style-name="Standard"/>
      <text:p text:style-name="Standard">Assina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invile Batista Junior</meta:initial-creator>
    <meta:creation-date>2026-03-03T16:22:12.45</meta:creation-date>
    <meta:generator>OpenOffice/4.1.14$Win32 OpenOffice.org_project/4114m1$Build-9811</meta:generator>
    <dc:date>2026-03-04T12:42:49.74</dc:date>
    <dc:creator>Joinvile Batista Junior</dc:creator>
    <meta:editing-duration>PT11M6S</meta:editing-duration>
    <meta:editing-cycles>5</meta:editing-cycles>
    <meta:document-statistic meta:table-count="0" meta:image-count="0" meta:object-count="0" meta:page-count="1" meta:paragraph-count="28" meta:word-count="141" meta:character-count="1213"/>
  </office:meta>
</office:document-meta>
</file>