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nguagem de Programação I - Etapa 2 - Leonardo Farias de Oliveira</text:p>
      <text:p text:style-name="Text_20_body">$$$ src.controle.projeto</text:p>
      <text:p text:style-name="Text_20_body">from scr.util.gerais import imprimir_objetos, imprimir_objeto, imprimir_objetos_internos, imprimir_objetos_associação_filtros</text:p>
      <text:p text:style-name="Text_20_body">from scr.util.data import Data</text:p>
      <text:p text:style-name="Text_20_body">from scr.entidades.seguradora import inserir_seguradora, Seguradora, get_seguradoras</text:p>
      <text:p text:style-name="Text_20_body">from scr.entidades.peça import Peça</text:p>
      <text:p text:style-name="Text_20_body">from scr.entidades.sinistro import inserir_sinistro, Sinistro, get_sinistros</text:p>
      <text:p text:style-name="Text_20_body">from scr.entidades.orcamento import criar_orçamento, get_orçamentos, selecionar_orçamento</text:p>
      <text:p text:style-name="Text_20_body"/>
      <text:p text:style-name="Text_20_body">def cadastrar_seguradoras():</text:p>
      <text:p text:style-name="Text_20_body"><text:s text:c="4"/>inserir_seguradora(Seguradora(nome='Porto Seguro', cidade='Dourados', cobertura_percentual=90))</text:p>
      <text:p text:style-name="Text_20_body"><text:s text:c="4"/>inserir_seguradora(Seguradora(nome='Bradesco Seguros', cidade='Campo Grande', cobertura_percentual=80))</text:p>
      <text:p text:style-name="Text_20_body"><text:s text:c="4"/>inserir_seguradora(Seguradora(nome='SulAmérica', cidade='Ponta porã', cobertura_percentual=70))</text:p>
      <text:p text:style-name="Text_20_body"><text:s text:c="4"/>inserir_seguradora(Seguradora(nome='Mapfre', cidade='Dourados', cobertura_percentual=85))</text:p>
      <text:p text:style-name="Text_20_body"><text:s text:c="4"/>inserir_seguradora(Seguradora(nome='Allianz', cidade='Campo Grande', cobertura_percentual=75))</text:p>
      <text:p text:style-name="Text_20_body"/>
      <text:p text:style-name="Text_20_body">def cadastrar_sinistros():</text:p>
      <text:p text:style-name="Text_20_body"><text:s text:c="4"/>sinistro = Sinistro(numero='1', cliente='Leon', telefone='99888-1100')</text:p>
      <text:p text:style-name="Text_20_body"><text:s text:c="4"/>inserir_sinistro(sinistro)</text:p>
      <text:p text:style-name="Text_20_body"><text:s text:c="4"/>sinistro.inserir_peça(Peça(nome='bandeja', categoria='OEM', preço=255, mecânico_próprio=False))</text:p>
      <text:p text:style-name="Text_20_body"/>
      <text:p text:style-name="Text_20_body"><text:s text:c="4"/>sinistro = Sinistro(numero='6', cliente='Scott', telefone='98988-1101')</text:p>
      <text:p text:style-name="Text_20_body"><text:s text:c="4"/>inserir_sinistro(sinistro)</text:p>
      <text:p text:style-name="Text_20_body"><text:s text:c="4"/>sinistro.inserir_peça(Peça(nome='amortecedor', categoria='Original', preço=310, mecânico_próprio=False))</text:p>
      <text:p text:style-name="Text_20_body"/>
      <text:p text:style-name="Text_20_body"><text:s text:c="4"/>sinistro = Sinistro(numero='11', cliente='Kennedy', telefone='96898-1000')</text:p>
      <text:p text:style-name="Text_20_body"><text:s text:c="4"/>inserir_sinistro(sinistro)</text:p>
      <text:p text:style-name="Text_20_body"><text:s text:c="4"/>sinistro.inserir_peça(Peça(nome='rolamento', categoria='Original', preço=180, mecânico_próprio=True))</text:p>
      <text:p text:style-name="Text_20_body"/>
      <text:p text:style-name="Text_20_body"><text:s text:c="4"/>sinistro = Sinistro(numero='19', cliente='Chris', telefone='90898-0100')</text:p>
      <text:p text:style-name="Text_20_body"><text:s text:c="4"/>inserir_sinistro(sinistro)</text:p>
      <text:p text:style-name="Text_20_body"><text:soft-page-break/><text:s text:c="4"/>sinistro.inserir_peça(Peça(nome='terminal', categoria='Original', preço=90, mecânico_próprio=True))</text:p>
      <text:p text:style-name="Text_20_body"/>
      <text:p text:style-name="Text_20_body"><text:s text:c="4"/>sinistro = Sinistro(numero='98', cliente='Redfield', telefone='91681-1198')</text:p>
      <text:p text:style-name="Text_20_body"><text:s text:c="4"/>inserir_sinistro(sinistro)</text:p>
      <text:p text:style-name="Text_20_body"><text:s text:c="4"/>sinistro.inserir_peça(Peça(nome='pivo', categoria='Genuína', preço=150, mecânico_próprio=True))</text:p>
      <text:p text:style-name="Text_20_body"/>
      <text:p text:style-name="Text_20_body">def cadastrar_orçamentos():</text:p>
      <text:p text:style-name="Text_20_body"><text:s text:c="4"/>criar_orçamento(numero_sinistro='1',nome_peça='bandeja', nome_seguradora='Porto Seguro', data=Data(dia=12, mês=6, ano=2026))</text:p>
      <text:p text:style-name="Text_20_body"><text:s text:c="4"/>criar_orçamento(numero_sinistro='6',nome_peça='amortecedor', nome_seguradora='Bradesco Seguros', data=Data(dia=10, mês=10, ano=2026))</text:p>
      <text:p text:style-name="Text_20_body"><text:s text:c="4"/>criar_orçamento(numero_sinistro='11',nome_peça='rolamento', nome_seguradora='SulAmérica', data=Data(dia=3, mês=8, ano=2026))</text:p>
      <text:p text:style-name="Text_20_body"><text:s text:c="4"/>criar_orçamento(numero_sinistro='19',nome_peça='terminal', nome_seguradora='Mapfre', data=Data(dia=2, mês=5, ano=2026))</text:p>
      <text:p text:style-name="Text_20_body"><text:s text:c="4"/>criar_orçamento(numero_sinistro='98',nome_peça='pivo', nome_seguradora='Allianz', data=Data(dia=28, mês=4, ano=2026))</text:p>
      <text:p text:style-name="Text_20_body"/>
      <text:p text:style-name="Text_20_body">def imprimir_somente_para_alinhar_formatação():</text:p>
      <text:p text:style-name="Text_20_body"><text:s text:c="4"/>print('\nSinistros: Numero - Cliente - Telefone')</text:p>
      <text:p text:style-name="Text_20_body"><text:s text:c="4"/>for índice, sinistro in enumerate(get_sinistros().values()): print(sinistro)</text:p>
      <text:p text:style-name="Text_20_body"><text:s text:c="4"/>print('\nPeças: Nome - Categoria - Preço - Mecânico Próprio')</text:p>
      <text:p text:style-name="Text_20_body"><text:s text:c="4"/>for sinistro in get_sinistros().values():</text:p>
      <text:p text:style-name="Text_20_body"><text:s text:c="8"/>for peça in sinistro.peças.values(): print(peça)</text:p>
      <text:p text:style-name="Text_20_body"/>
      <text:p text:style-name="Text_20_body">if __name__ == '__main__':</text:p>
      <text:p text:style-name="Text_20_body"><text:s text:c="4"/>cadastrar_seguradoras()</text:p>
      <text:p text:style-name="Text_20_body"><text:s text:c="4"/>imprimir_objetos(cabeçalho= '\n Seguradoras: Nome <text:s/>- <text:s/>Cidade <text:s/>- <text:s/>Cobertura percentual', objetos=get_seguradoras().values())</text:p>
      <text:p text:style-name="Text_20_body"><text:s text:c="4"/>cadastrar_sinistros()</text:p>
      <text:p text:style-name="Text_20_body"><text:s text:c="4"/>imprimir_somente_para_alinhar_formatação()</text:p>
      <text:p text:style-name="Text_20_body"><text:s text:c="4"/>print('\nSinistros: Número - Cliente - Telefone')</text:p>
      <text:p text:style-name="Text_20_body"><text:s text:c="4"/>print(' - Peças: Nome - Categoria - Preço - Mecânico Próprio')</text:p>
      <text:p text:style-name="Text_20_body"><text:s text:c="4"/>for índice, sinistro in enumerate(get_sinistros().values()):</text:p>
      <text:p text:style-name="Text_20_body"><text:s text:c="8"/>imprimir_objeto(índice=índice, objeto_str=sinistro)</text:p>
      <text:p text:style-name="Text_20_body"><text:s text:c="8"/>print('-' * 60)</text:p>
      <text:p text:style-name="Text_20_body"><text:s text:c="8"/>imprimir_objetos_internos(sinistro.peças.values())</text:p>
      <text:p text:style-name="Text_20_body"><text:soft-page-break/><text:s text:c="8"/>print('\n')</text:p>
      <text:p text:style-name="Text_20_body"><text:s text:c="8"/>print('*' * 60)</text:p>
      <text:p text:style-name="Text_20_body"><text:s text:c="8"/>print('\n')</text:p>
      <text:p text:style-name="Text_20_body"><text:s text:c="4"/>cadastrar_orçamentos()</text:p>
      <text:p text:style-name="Text_20_body"><text:s text:c="4"/>cabeçalho_orçamento = ('Orçamento: Numero do Sinistro - Nome da Peça - Nome da Seguradora - Data do orçamento')</text:p>
      <text:p text:style-name="Text_20_body"><text:s text:c="4"/>imprimir_objetos('\n' + cabeçalho_orçamento, get_orçamentos())</text:p>
      <text:p text:style-name="Text_20_body"><text:s text:c="4"/></text:p>
      <text:p text:style-name="Text_20_body"><text:s text:c="4"/>filtros, orçamentos_selecionados = selecionar_orçamento()</text:p>
      <text:p text:style-name="Text_20_body"><text:s text:c="4"/>cabeçalho_orçamento_filtros = (cabeçalho_orçamento + '\n -- Cobertura Percentual - Telefone no Sinistro - Preço da peça')</text:p>
      <text:p text:style-name="Text_20_body"><text:s text:c="4"/>imprimir_objetos_associação_filtros(cabeçalho_orçamento_filtros, orçamentos_selecionados, filtros)</text:p>
      <text:p text:style-name="Text_20_body"/>
      <text:p text:style-name="Text_20_body"><text:s text:c="4"/>filtros, orçamentos_selecionados = selecionar_orçamento(data_mínima_orçamento=Data(dia=1, mês=5, ano=2026))</text:p>
      <text:p text:style-name="Text_20_body"><text:s text:c="4"/>imprimir_objetos_associação_filtros(cabeçalho_orçamento_filtros, orçamentos_selecionados, filtros)</text:p>
      <text:p text:style-name="Text_20_body"/>
      <text:p text:style-name="Text_20_body"><text:s text:c="4"/>filtros, orçamentos_selecionados = selecionar_orçamento(Data(1, 5, 2026), valor_máximo_peça=255)</text:p>
      <text:p text:style-name="Text_20_body"><text:s text:c="4"/>imprimir_objetos_associação_filtros(cabeçalho_orçamento_filtros, orçamentos_selecionados, filtros)</text:p>
      <text:p text:style-name="Text_20_body"/>
      <text:p text:style-name="Text_20_body"><text:s text:c="4"/>filtros, orçamentos_selecionados = selecionar_orçamento(Data(1, 5, 2026), 255, cobertura_mínima_seguradora=85)</text:p>
      <text:p text:style-name="Text_20_body"><text:s text:c="4"/>imprimir_objetos_associação_filtros(cabeçalho_orçamento_filtros, orçamentos_selecionados, filtros)</text:p>
      <text:p text:style-name="Text_20_body"/>
      <text:p text:style-name="Text_20_body"><text:s text:c="4"/>filtros, orçamentos_selecionados = selecionar_orçamento(Data(1, 5, 2026), 255, 85, prefixo_telefone_cliente=99)</text:p>
      <text:p text:style-name="Text_20_body"><text:s text:c="4"/>imprimir_objetos_associação_filtros(cabeçalho_orçamento_filtros, orçamentos_selecionados, filtros)</text:p>
      <text:p text:style-name="P1">$$$ src.entidades.seguradora</text:p>
      <text:p text:style-name="Text_20_body">seguradoras = {}</text:p>
      <text:p text:style-name="Text_20_body"/>
      <text:p text:style-name="Text_20_body">def get_seguradoras(): return seguradoras</text:p>
      <text:p text:style-name="Text_20_body"/>
      <text:p text:style-name="Text_20_body">def inserir_seguradora(seguradora): </text:p>
      <text:p text:style-name="Text_20_body"><text:s text:c="4"/>nome_seguradora = seguradora.nome</text:p>
      <text:p text:style-name="Text_20_body"><text:s text:c="4"/>if nome_seguradora not in seguradoras.keys():</text:p>
      <text:p text:style-name="Text_20_body"><text:s text:c="8"/>seguradoras[nome_seguradora] = seguradora</text:p>
      <text:p text:style-name="Text_20_body"><text:s text:c="8"/>return True</text:p>
      <text:p text:style-name="Text_20_body"><text:s text:c="4"/>else:</text:p>
      <text:p text:style-name="Text_20_body"><text:s text:c="8"/>print('Seguradora ' + nome_seguradora + ' tem cadastro')</text:p>
      <text:p text:style-name="Text_20_body"><text:s text:c="8"/>return False</text:p>
      <text:p text:style-name="Text_20_body"/>
      <text:p text:style-name="Text_20_body">class Seguradora:</text:p>
      <text:p text:style-name="Text_20_body"><text:s text:c="4"/></text:p>
      <text:p text:style-name="Text_20_body"><text:s text:c="4"/>def __init__(self, nome, cidade, cobertura_percentual):</text:p>
      <text:p text:style-name="Text_20_body"><text:s text:c="8"/>self.nome = nome</text:p>
      <text:p text:style-name="Text_20_body"><text:s text:c="8"/>self.cidade = cidade</text:p>
      <text:p text:style-name="Text_20_body"><text:s text:c="8"/>self.cobertura_percentual = cobertura_percentual</text:p>
      <text:p text:style-name="Text_20_body"><text:s text:c="4"/></text:p>
      <text:p text:style-name="Text_20_body"><text:s text:c="4"/>def __str__(self):</text:p>
      <text:p text:style-name="Text_20_body"><text:s text:c="8"/>formato = '{} {:&lt;18} {} {:&lt;14} {} {:&lt;3} {}'</text:p>
      <text:p text:style-name="Text_20_body"><text:s text:c="8"/>seguradora_formatada = formato.format('|', self.nome, '|', self.cidade, '|', str(self.cobertura_percentual), '|')</text:p>
      <text:p text:style-name="Text_20_body"><text:s text:c="8"/>return seguradora_formatada</text:p>
      <text:p text:style-name="P1">$$$ src.entidades.peça</text:p>
      <text:p text:style-name="Text_20_body">class Peça:</text:p>
      <text:p text:style-name="Text_20_body"/>
      <text:p text:style-name="Text_20_body"><text:s text:c="4"/>def __init__(self, nome, categoria, preço, mecânico_próprio):</text:p>
      <text:p text:style-name="Text_20_body"><text:s text:c="8"/>self.nome = nome</text:p>
      <text:p text:style-name="Text_20_body"><text:s text:c="8"/>self.categoria = categoria if categoria in ('Original', 'Genuína', 'OEM') else 'indefinida'</text:p>
      <text:p text:style-name="Text_20_body"><text:s text:c="8"/>self.preço = preço</text:p>
      <text:p text:style-name="Text_20_body"><text:s text:c="8"/>self.mecânico_próprio = mecânico_próprio</text:p>
      <text:p text:style-name="Text_20_body"/>
      <text:p text:style-name="Text_20_body"><text:s text:c="4"/>def __str__(self):</text:p>
      <text:p text:style-name="Text_20_body"><text:s text:c="8"/>if self.mecânico_próprio: mecânico_próprio_str = ' Mecânico Próprio |'</text:p>
      <text:p text:style-name="Text_20_body"><text:s text:c="8"/>else: mecânico_próprio_str = ''</text:p>
      <text:p text:style-name="Text_20_body"><text:s text:c="8"/>formato = ' <text:s text:c="2"/>{} {:&lt;15} {} {:&lt;12} {} {:&lt;6} {} {}'</text:p>
      <text:p text:style-name="Text_20_body"><text:s text:c="8"/>peça_formatado = formato.format('|', self.nome, '|', self.categoria, '|', self.preço, '|', mecânico_próprio_str)</text:p>
      <text:p text:style-name="Text_20_body"><text:s text:c="8"/>return peça_formatado</text:p>
      <text:p text:style-name="Text_20_body"/>
      <text:p text:style-name="P1">$$$ src.entidades.orçamento</text:p>
      <text:p text:style-name="Text_20_body">from scr.entidades.seguradora import get_seguradoras</text:p>
      <text:p text:style-name="Text_20_body">from scr.entidades.sinistro import get_sinistros</text:p>
      <text:p text:style-name="Text_20_body"/>
      <text:p text:style-name="Text_20_body">orçamentos = []</text:p>
      <text:p text:style-name="Text_20_body"/>
      <text:p text:style-name="Text_20_body">def get_orçamentos(): return orçamentos</text:p>
      <text:p text:style-name="Text_20_body"/>
      <text:p text:style-name="Text_20_body">def inserir_orçamento(orçamento):</text:p>
      <text:p text:style-name="Text_20_body"><text:s text:c="4"/>if orçamento not in orçamentos: orçamentos.append(orçamento)</text:p>
      <text:p text:style-name="Text_20_body"><text:s text:c="4"/>else: print ('Orçamento de Peças tem cadastro --- ' + str(orçamento))</text:p>
      <text:p text:style-name="Text_20_body"/>
      <text:p text:style-name="Text_20_body">def criar_orçamento(numero_sinistro, nome_peça, nome_seguradora, data):</text:p>
      <text:p text:style-name="Text_20_body"><text:s text:c="4"/>sinistro = get_sinistros()[numero_sinistro]</text:p>
      <text:p text:style-name="Text_20_body"><text:s text:c="4"/>if sinistro is None:</text:p>
      <text:p text:style-name="Text_20_body"><text:s text:c="8"/>print('Sinistro ' + numero_sinistro + ' não cadastrado')</text:p>
      <text:p text:style-name="Text_20_body"><text:s text:c="8"/>return</text:p>
      <text:p text:style-name="Text_20_body"><text:s text:c="4"/>peça = sinistro.peças[nome_peça]</text:p>
      <text:p text:style-name="Text_20_body"><text:s text:c="4"/>if peça is None:</text:p>
      <text:p text:style-name="Text_20_body"><text:s text:c="8"/>print('Peça ' + nome_peça + ' não cadastrada no sinistro ' + numero_sinistro)</text:p>
      <text:p text:style-name="Text_20_body"><text:s text:c="8"/>return</text:p>
      <text:p text:style-name="Text_20_body"><text:s text:c="4"/>seguradora = get_seguradoras()[nome_seguradora]</text:p>
      <text:p text:style-name="Text_20_body"><text:s text:c="4"/>if seguradora is None:</text:p>
      <text:p text:style-name="Text_20_body"><text:s text:c="8"/>print('Seguradora' + nome_seguradora + ' Não cadastrada')</text:p>
      <text:p text:style-name="Text_20_body"><text:s text:c="8"/>return</text:p>
      <text:p text:style-name="Text_20_body"><text:s text:c="4"/>orçamento = Orçamento(sinistro, peça, seguradora, data)</text:p>
      <text:p text:style-name="Text_20_body"><text:s text:c="4"/>inserir_orçamento(orçamento)</text:p>
      <text:p text:style-name="Text_20_body"/>
      <text:p text:style-name="Text_20_body">def selecionar_orçamento(data_mínima_orçamento=None, valor_máximo_peça=None, cobertura_mínima_seguradora=None, prefixo_telefone_cliente=None):</text:p>
      <text:p text:style-name="Text_20_body"><text:s text:c="4"/>filtros = '\nFiltros -- '</text:p>
      <text:p text:style-name="Text_20_body"><text:s text:c="4"/>if data_mínima_orçamento is not None: filtros += ' Data mínima do orçamento: ' + str(data_mínima_orçamento)</text:p>
      <text:p text:style-name="Text_20_body"><text:s text:c="4"/>if valor_máximo_peça is not None: filtros += ' Menor valor da peça: ' + str(valor_máximo_peça)</text:p>
      <text:p text:style-name="Text_20_body"><text:s text:c="4"/>if cobertura_mínima_seguradora is not None: filtros += '\n - Cobertura mínima da seguradora: ' + str(cobertura_mínima_seguradora)</text:p>
      <text:p text:style-name="Text_20_body"><text:s text:c="4"/>if prefixo_telefone_cliente is not None: filtros += (' - Telefone do Cliente: ' + str(prefixo_telefone_cliente))</text:p>
      <text:p text:style-name="Text_20_body"><text:soft-page-break/><text:s text:c="4"/>orçamentos_selecionados = []</text:p>
      <text:p text:style-name="Text_20_body"><text:s text:c="4"/>for orçamento in orçamentos:</text:p>
      <text:p text:style-name="Text_20_body"><text:s text:c="8"/>if data_mínima_orçamento is not None and orçamento.data &lt; data_mínima_orçamento: continue</text:p>
      <text:p text:style-name="Text_20_body"><text:s text:c="8"/>if valor_máximo_peça is not None and orçamento.peça.preço &gt; valor_máximo_peça: continue</text:p>
      <text:p text:style-name="Text_20_body"><text:s text:c="8"/>if (cobertura_mínima_seguradora is not None and orçamento.seguradora.cobertura_percentual &lt; cobertura_mínima_seguradora): continue</text:p>
      <text:p text:style-name="Text_20_body"><text:s text:c="8"/>if prefixo_telefone_cliente is not None and not orçamento.sinistro.telefone.startswith(str(prefixo_telefone_cliente)): continue</text:p>
      <text:p text:style-name="Text_20_body"><text:s text:c="8"/>orçamentos_selecionados.append(orçamento)</text:p>
      <text:p text:style-name="Text_20_body"><text:s text:c="4"/>return filtros, orçamentos_selecionados</text:p>
      <text:p text:style-name="Text_20_body"/>
      <text:p text:style-name="Text_20_body">class Orçamento:</text:p>
      <text:p text:style-name="Text_20_body"/>
      <text:p text:style-name="Text_20_body"><text:s text:c="4"/>def __init__(self, sinistro, peça, seguradora, data):</text:p>
      <text:p text:style-name="Text_20_body"><text:s text:c="8"/>self.sinistro = sinistro</text:p>
      <text:p text:style-name="Text_20_body"><text:s text:c="8"/>self.peça = peça</text:p>
      <text:p text:style-name="Text_20_body"><text:s text:c="8"/>self.seguradora = seguradora</text:p>
      <text:p text:style-name="Text_20_body"><text:s text:c="8"/>self.data = data</text:p>
      <text:p text:style-name="Text_20_body"/>
      <text:p text:style-name="Text_20_body"><text:s text:c="4"/>def __str__(self):</text:p>
      <text:p text:style-name="Text_20_body"><text:s text:c="8"/>formato = '{} {:&lt;15} {} {:&lt;17} {} {:&lt;19} {} {:&lt;10} {}'</text:p>
      <text:p text:style-name="Text_20_body"><text:s text:c="8"/>mostra_formato = formato.format('|', self.sinistro.numero, '|', self.peça.nome, '|', self.seguradora.nome, '|', str(self.data), '|')</text:p>
      <text:p text:style-name="Text_20_body"><text:s text:c="8"/>return mostra_formato</text:p>
      <text:p text:style-name="Text_20_body"/>
      <text:p text:style-name="Text_20_body"><text:s text:c="4"/>def str_filtro(self):</text:p>
      <text:p text:style-name="Text_20_body"><text:s text:c="8"/>formato = '{:&gt;2} {} {:&lt;11} {} {:&lt;3} {}'</text:p>
      <text:p text:style-name="Text_20_body"><text:s text:c="8"/>filtro_formatado = formato.format(str(self.seguradora.cobertura_percentual), '|', self.sinistro.telefone, '|', f'{self.peça.preço}' + ' preço', '|')</text:p>
      <text:p text:style-name="Text_20_body"><text:s text:c="8"/>return self.__str__() + filtro_formatado</text:p>
      <text:p text:style-name="Text_20_body"/>
      <text:p text:style-name="P1">$$$ src.entidades.sinistro</text:p>
      <text:p text:style-name="Text_20_body">sinistros = {}</text:p>
      <text:p text:style-name="Text_20_body"/>
      <text:p text:style-name="Text_20_body">def get_sinistros (): return sinistros</text:p>
      <text:p text:style-name="Text_20_body"/>
      <text:p text:style-name="Text_20_body">def inserir_sinistro(sinistro):</text:p>
      <text:p text:style-name="Text_20_body"><text:s text:c="4"/>numero_sisnitro = sinistro.numero</text:p>
      <text:p text:style-name="Text_20_body"><text:s text:c="4"/>if numero_sisnitro not in sinistros.keys():</text:p>
      <text:p text:style-name="Text_20_body"><text:s text:c="8"/>sinistros[numero_sisnitro] = sinistro</text:p>
      <text:p text:style-name="Text_20_body"><text:s text:c="8"/>return True</text:p>
      <text:p text:style-name="Text_20_body"><text:s text:c="4"/>else:</text:p>
      <text:p text:style-name="Text_20_body"><text:s text:c="8"/>print('Sinistro ' + numero_sisnitro + ' já tem cadastro')</text:p>
      <text:p text:style-name="Text_20_body"><text:s text:c="8"/>return False</text:p>
      <text:p text:style-name="Text_20_body"/>
      <text:p text:style-name="Text_20_body">class Sinistro:</text:p>
      <text:p text:style-name="Text_20_body"/>
      <text:p text:style-name="Text_20_body"><text:s text:c="4"/>def __init__(self, numero, cliente, telefone):</text:p>
      <text:p text:style-name="Text_20_body"><text:s text:c="8"/>self.numero = numero</text:p>
      <text:p text:style-name="Text_20_body"><text:s text:c="8"/>self.cliente = cliente</text:p>
      <text:p text:style-name="Text_20_body"><text:s text:c="8"/>self.telefone = telefone</text:p>
      <text:p text:style-name="Text_20_body"><text:s text:c="8"/>self.peças = {}</text:p>
      <text:p text:style-name="Text_20_body"/>
      <text:p text:style-name="Text_20_body"><text:s text:c="4"/>def __str__(self):</text:p>
      <text:p text:style-name="Text_20_body"><text:s text:c="8"/>formato = '{} {:&lt;15} {} {:&lt;21} {} {:&lt;14}'</text:p>
      <text:p text:style-name="Text_20_body"><text:s text:c="8"/>sinistro_formatado = formato.format('|', self.numero, '|', self.cliente, '|', self.telefone) <text:s text:c="5"/></text:p>
      <text:p text:style-name="Text_20_body"><text:s text:c="8"/>return sinistro_formatado</text:p>
      <text:p text:style-name="Text_20_body"><text:s text:c="4"/></text:p>
      <text:p text:style-name="Text_20_body"><text:s text:c="4"/>def inserir_peça(self, peça):</text:p>
      <text:p text:style-name="Text_20_body"><text:s text:c="8"/>nome_peça = peça.nome</text:p>
      <text:p text:style-name="Text_20_body"><text:s text:c="8"/>if nome_peça not in self.peças.keys(): self.peças[nome_peça] = peça</text:p>
      <text:p text:style-name="Text_20_body"><text:s text:c="8"/>else: print('Nome ' + nome_peça + ' já foi cadastrada em Sinistro')</text:p>
      <text:p text:style-name="Text_20_body"/>
      <text:p text:style-name="P1">$$$ src.util.data</text:p>
      <text:p text:style-name="Text_20_body">from datetime import date</text:p>
      <text:p text:style-name="Text_20_body"/>
      <text:p text:style-name="Text_20_body">class Data:</text:p>
      <text:p text:style-name="Text_20_body"><text:s text:c="4"/>def __init__(self, dia, mês, ano):</text:p>
      <text:p text:style-name="Text_20_body"><text:s text:c="8"/>self.dia = dia</text:p>
      <text:p text:style-name="Text_20_body"><text:s text:c="8"/>self.mês = mês</text:p>
      <text:p text:style-name="Text_20_body"><text:s text:c="8"/>self.ano = ano</text:p>
      <text:p text:style-name="Text_20_body"/>
      <text:p text:style-name="Text_20_body"><text:s text:c="4"/>def __str__(self):</text:p>
      <text:p text:style-name="Text_20_body"><text:s text:c="8"/>if self.dia &lt; 10: data_str = '0' + str(self.dia)</text:p>
      <text:p text:style-name="Text_20_body"><text:s text:c="8"/>else: data_str = str(self.dia)</text:p>
      <text:p text:style-name="Text_20_body"><text:s text:c="8"/>if self.mês &lt; 10: data_str += "/0" + str(self.mês) + "/"</text:p>
      <text:p text:style-name="Text_20_body"><text:s text:c="8"/>else: data_str += "/" + str(self.mês) + "/"</text:p>
      <text:p text:style-name="Text_20_body"><text:s text:c="8"/>data_str += str(self.ano)</text:p>
      <text:p text:style-name="Text_20_body"><text:s text:c="8"/>return data_str</text:p>
      <text:p text:style-name="Text_20_body"/>
      <text:p text:style-name="Text_20_body"><text:s text:c="4"/>def __eq__(self, data):</text:p>
      <text:p text:style-name="Text_20_body"><text:s text:c="8"/>if self.dia == data.dia and self.mês == data.mês and self.ano == data.ano: return True</text:p>
      <text:p text:style-name="Text_20_body"><text:s text:c="8"/>return False</text:p>
      <text:p text:style-name="Text_20_body"/>
      <text:p text:style-name="Text_20_body"><text:s text:c="4"/>def __ne__(self, data): return not self == data</text:p>
      <text:p text:style-name="Text_20_body"><text:s text:c="3"/></text:p>
      <text:p text:style-name="Text_20_body"><text:s text:c="4"/>def __gt__(self, data):</text:p>
      <text:p text:style-name="Text_20_body"><text:s text:c="8"/>if self.ano &gt; data.ano: return True</text:p>
      <text:p text:style-name="Text_20_body"><text:s text:c="8"/>elif self.ano &lt; data.ano: return False</text:p>
      <text:p text:style-name="Text_20_body"><text:s text:c="8"/>if self.mês &gt; data.mês: return True</text:p>
      <text:p text:style-name="Text_20_body"><text:s text:c="8"/>elif self.mês &lt; data.mês: return False</text:p>
      <text:p text:style-name="Text_20_body"><text:s text:c="8"/>if self.dia &gt; data.dia: return True</text:p>
      <text:p text:style-name="Text_20_body"><text:s text:c="8"/>elif self.dia &lt; data.dia: return False</text:p>
      <text:p text:style-name="Text_20_body"><text:s text:c="8"/>return False</text:p>
      <text:p text:style-name="Text_20_body"/>
      <text:p text:style-name="Text_20_body"><text:s text:c="4"/>def __lt__(self, data):</text:p>
      <text:p text:style-name="Text_20_body"><text:s text:c="8"/>if self.ano &lt; data.ano: return True</text:p>
      <text:p text:style-name="Text_20_body"><text:s text:c="8"/>elif self.ano &gt; data.ano: return False</text:p>
      <text:p text:style-name="Text_20_body"><text:s text:c="8"/>if self.mês &lt; data.mês: return True</text:p>
      <text:p text:style-name="Text_20_body"><text:s text:c="8"/>elif self.mês &gt; data.mês: return False</text:p>
      <text:p text:style-name="Text_20_body"><text:soft-page-break/><text:s text:c="8"/>if self.dia &lt; data.dia: return True</text:p>
      <text:p text:style-name="Text_20_body"><text:s text:c="8"/>elif self.ano &gt; data.ano: return False</text:p>
      <text:p text:style-name="Text_20_body"><text:s text:c="8"/>return False</text:p>
      <text:p text:style-name="Text_20_body"/>
      <text:p text:style-name="Text_20_body"><text:s text:c="4"/>def __ge__(self, data):</text:p>
      <text:p text:style-name="Text_20_body"><text:s text:c="8"/>if self &lt; data: return False</text:p>
      <text:p text:style-name="Text_20_body"><text:s text:c="8"/>else: return True</text:p>
      <text:p text:style-name="Text_20_body"><text:s text:c="8"/></text:p>
      <text:p text:style-name="Text_20_body"><text:s text:c="4"/>def __le__(self, data):</text:p>
      <text:p text:style-name="Text_20_body"><text:s text:c="8"/>if self &gt; data: return False</text:p>
      <text:p text:style-name="Text_20_body"><text:s text:c="8"/>else: return True</text:p>
      <text:p text:style-name="Text_20_body"/>
      <text:p text:style-name="Text_20_body"><text:s text:c="4"/>def calcular_idade(self, data_referência=None):</text:p>
      <text:p text:style-name="Text_20_body"><text:s text:c="8"/>if data_referência is None:</text:p>
      <text:p text:style-name="Text_20_body"><text:s text:c="12"/>dia_atual_str, mês_atual_str, ano_atual_str = date.today().strftime("%d/%m/%Y").split('/') </text:p>
      <text:p text:style-name="Text_20_body"><text:s text:c="12"/>dia_referência, mês_referência, ano_referência = int(dia_atual_str), int(mês_atual_str), int(ano_atual_str)</text:p>
      <text:p text:style-name="Text_20_body"><text:s text:c="8"/>else:</text:p>
      <text:p text:style-name="Text_20_body"><text:s text:c="12"/>dia_referência, mês_referência, ano_referência = data_referência.dia, data_referência.mês, data_referência.ano</text:p>
      <text:p text:style-name="Text_20_body"><text:s text:c="12"/>idade = ano_referência - self.ano</text:p>
      <text:p text:style-name="Text_20_body"><text:s text:c="8"/>if mês_referência &lt; self.mês or (mês_referência == self.mês and dia_referência &lt; self.dia): idade -= 1</text:p>
      <text:p text:style-name="Text_20_body"><text:s text:c="8"/>return idade</text:p>
      <text:p text:style-name="Text_20_body"/>
      <text:p text:style-name="P1">$$$ src.util.gerais</text:p>
      <text:p text:style-name="Text_20_body">def imprimir_objet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indice, objeto in enumerate(objetos): </text:p>
      <text:p text:style-name="Text_20_body"><text:s text:c="8"/>imprimir_objeto(indice, str(objeto))</text:p>
      <text:p text:style-name="Text_20_body"/>
      <text:p text:style-name="Text_20_body"/>
      <text:p text:style-name="Text_20_body">def imprimir_objeto(indice, objeto_str):</text:p>
      <text:p text:style-name="Text_20_body"><text:s text:c="4"/>formato = '{} {} {}'</text:p>
      <text:p text:style-name="Text_20_body"><text:s text:c="4"/>ordem = indice + 1</text:p>
      <text:p text:style-name="Text_20_body"><text:s text:c="4"/>separador = '_'</text:p>
      <text:p text:style-name="Text_20_body"><text:s text:c="4"/>string_formatado = formato.format(f'{ordem:2d}', separador, objeto_str)</text:p>
      <text:p text:style-name="Text_20_body"><text:s text:c="4"/>print(string_formatado)</text:p>
      <text:p text:style-name="Text_20_body"/>
      <text:p text:style-name="Text_20_body">def imprimir_objetos_associação_filtr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índice, objeto in enumerate(objetos):</text:p>
      <text:p text:style-name="Text_20_body"><text:s text:c="8"/>imprimir_objeto(índice, objeto.str_filtro())</text:p>
      <text:p text:style-name="Text_20_body"/>
      <text:p text:style-name="Text_20_body">def imprimir_objeto (índice, objeto_str):</text:p>
      <text:p text:style-name="Text_20_body"><text:s text:c="4"/>formato = '{} {} {}'</text:p>
      <text:p text:style-name="Text_20_body"><text:s text:c="4"/>ordem = índice + 1</text:p>
      <text:p text:style-name="Text_20_body"><text:s text:c="4"/>separador = '-'</text:p>
      <text:p text:style-name="Text_20_body"><text:s text:c="4"/>string_formatado = formato.format( f'{ordem:2d}', separador, objeto_str)</text:p>
      <text:p text:style-name="Text_20_body"><text:s text:c="4"/>print(string_formatado)</text:p>
      <text:p text:style-name="Text_20_body"/>
      <text:p text:style-name="Text_20_body">def imprimir_objetos_internos (objetos):</text:p>
      <text:p text:style-name="Text_20_body"><text:s text:c="4"/>for objeto in objetos: print(' -' + str(objeto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Farias de Oliveira</meta:initial-creator>
    <meta:creation-date>2026-04-07T19:47:56</meta:creation-date>
    <dc:date>2026-04-07T21:17:47.86</dc:date>
    <meta:editing-duration>PT23M54S</meta:editing-duration>
    <meta:editing-cycles>6</meta:editing-cycles>
    <meta:generator>OpenOffice/4.1.16$Win32 OpenOffice.org_project/4116m3$Build-9816</meta:generator>
    <meta:document-statistic meta:table-count="0" meta:image-count="0" meta:object-count="0" meta:page-count="11" meta:paragraph-count="259" meta:word-count="1192" meta:character-count="13478"/>
  </office:meta>
</office:document-meta>
</file>